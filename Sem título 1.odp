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2.749cm" fo:min-width="3.99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0.749cm" fo:min-width="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0.749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.749cm" fo:min-width="6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0.749cm" fo:min-width="8cm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4.499cm" svg:height="2.999cm" svg:x="6.001cm" svg:y="2.5cm">
          <text:p text:style-name="P1">Crew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99cm" svg:height="2.999cm" svg:x="14.501cm" svg:y="2.501cm">
          <text:p text:style-name="P1">Flow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0.999cm" svg:x="10.5cm" svg:y="6.001cm">
          <text:p text:style-name="P1">Ambient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0.999cm" svg:x="10.5cm" svg:y="7.5cm">
          <text:p text:style-name="P1">Módul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0.999cm" svg:x="10.5cm" svg:y="9.5cm">
          <text:p text:style-name="P1">Fluxo de trabalh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0.999cm" svg:x="10.5cm" svg:y="7.501cm">
          <text:p text:style-name="P1">Módul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999cm" svg:x="10.5cm" svg:y="11cm">
          <text:p text:style-name="P1">Pontos de integraçã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999cm" svg:x="10.5cm" svg:y="12.5cm">
          <text:p text:style-name="P1">Arquivos essenciai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0.999cm" svg:x="10.5cm" svg:y="14.001cm">
          <text:p text:style-name="P1">Agentes, tarefas e papé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15:01:31.301049487</meta:creation-date>
    <dc:date>2026-05-03T16:22:02.795493595</dc:date>
    <meta:editing-duration>PT1H9M2S</meta:editing-duration>
    <meta:editing-cycles>3</meta:editing-cycles>
    <meta:generator>LibreOffice/26.2.2.2$Linux_X86_64 LibreOffice_project/620$Build-2</meta:generator>
    <meta:document-statistic meta:object-count="32"/>
  </office:meta>
</office:document-meta>
</file>